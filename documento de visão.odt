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D0000051FC8D3F1B5.png" manifest:media-type="image/png"/>
  <manifest:file-entry manifest:full-path="Pictures/1000A08D00005B5D000139FCF832DC87.svg" manifest:media-type="image/svg+xml"/>
  <manifest:file-entry manifest:full-path="Pictures/1000000000000640000002F1A03F2A6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5.491cm"/>
    </style:style>
    <style:style style:name="Tabela1.B" style:family="table-column">
      <style:table-column-properties style:column-width="5.406cm"/>
    </style:style>
    <style:style style:name="Tabela1.C" style:family="table-column">
      <style:table-column-properties style:column-width="6.103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007cm"/>
    </style:style>
    <style:style style:name="Tabela2.B" style:family="table-column">
      <style:table-column-properties style:column-width="13.993cm"/>
    </style:style>
    <style:style style:name="Tabela2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Heading_20_2">
      <style:text-properties fo:color="#000000" loext:opacity="100%" style:font-name="Google Sans" officeooo:rsid="001afd38" officeooo:paragraph-rsid="0010500e"/>
    </style:style>
    <style:style style:name="P2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Google Sans" officeooo:rsid="001afd38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Google Sans Text" officeooo:rsid="001afd38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6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7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Google Sans" officeooo:rsid="001afd38"/>
    </style:style>
    <style:style style:name="P8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9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10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11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12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Google Sans Text" officeooo:rsid="001afd38"/>
    </style:style>
    <style:style style:name="P15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16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17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18" style:family="paragraph" style:parent-style-name="Text_20_body" style:list-style-name="L1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19" style:family="paragraph" style:parent-style-name="Text_20_body" style:list-style-name="L1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20" style:family="paragraph" style:parent-style-name="Text_20_body" style:list-style-name="L1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21" style:family="paragraph" style:parent-style-name="Text_20_body" style:list-style-name="L1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22" style:family="paragraph" style:parent-style-name="Text_20_body" style:list-style-name="L1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23" style:family="paragraph" style:parent-style-name="Text_20_body" style:list-style-name="L1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24" style:family="paragraph" style:parent-style-name="Text_20_body" style:list-style-name="L1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25" style:family="paragraph" style:parent-style-name="Text_20_body" style:list-style-name="L1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26" style:family="paragraph" style:parent-style-name="Text_20_body" style:list-style-name="L2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27" style:family="paragraph" style:parent-style-name="Text_20_body" style:list-style-name="L2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28" style:family="paragraph" style:parent-style-name="Text_20_body" style:list-style-name="L2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29" style:family="paragraph" style:parent-style-name="Text_20_body" style:list-style-name="L2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officeooo:rsid="001afd38"/>
    </style:style>
    <style:style style:name="P30" style:family="paragraph" style:parent-style-name="Text_20_body">
      <style:text-properties fo:color="#000000" loext:opacity="100%" officeooo:rsid="001afd38" officeooo:paragraph-rsid="0010500e"/>
    </style:style>
    <style:style style:name="P31" style:family="paragraph" style:parent-style-name="Text_20_body">
      <style:text-properties fo:color="#000000" loext:opacity="100%" style:text-underline-style="solid" style:text-underline-type="double" style:text-underline-width="auto" style:text-underline-color="font-color" officeooo:rsid="0022d696" officeooo:paragraph-rsid="0022d696"/>
    </style:style>
    <style:style style:name="P32" style:family="paragraph" style:parent-style-name="Text_20_body">
      <style:text-properties fo:color="#000000" loext:opacity="100%" style:text-underline-style="solid" style:text-underline-type="double" style:text-underline-width="auto" style:text-underline-color="font-color" officeooo:rsid="002620dd" officeooo:paragraph-rsid="002620dd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style:font-name-asian="Google Sans Text" style:font-name-complex="Google Sans Tex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Identificação do Projeto</text:h>
      <text:list text:style-name="L1">
        <text:list-item>
          <text:p text:style-name="P2"><text:bookmark text:name="p-rc_f3a4f93b99f6a652-320"/><text:span text:style-name="T1">Nome do Projeto:</text:span> Projeto Turismo </text:p>
        </text:list-item>
        <text:list-item>
          <text:p text:style-name="P2"><text:bookmark text:name="p-rc_f3a4f93b99f6a652-321"/><text:span text:style-name="T1">Versão:</text:span> 1.0 </text:p>
        </text:list-item>
        <text:list-item>
          <text:p text:style-name="P2"><text:bookmark text:name="p-rc_f3a4f93b99f6a652-322"/><text:span text:style-name="T1">Data:</text:span> 13/06/2026 </text:p>
        </text:list-item>
        <text:list-item>
          <text:p text:style-name="P2"><text:bookmark text:name="p-rc_f3a4f93b99f6a652-323"/><text:span text:style-name="T1">Autores:</text:span> Ricardo Cardoso Akimoto, Felipe Conrado e André </text:p>
        </text:list-item>
        <text:list-item>
          <text:p text:style-name="P2"><text:bookmark text:name="p-rc_f3a4f93b99f6a652-324"/><text:span text:style-name="T1">Status:</text:span> Em desenvolvimento </text:p>
        </text:list-item>
      </text:list>
      <text:h text:style-name="P3" text:outline-level="2">2. Visão Geral e Motivação</text:h>
      <text:p text:style-name="P4"><text:bookmark text:name="p-rc_f3a4f93b99f6a652-325"/>O Projeto Turismo consiste no desenvolvimento de uma aplicação voltada ao auxílio de turistas durante o planejamento e realização de viagens. A motivação para a criação do sistema surgiu da necessidade de tornar a experiência turística mais simples, organizada e personalizada. </text:p>
      <text:p text:style-name="P4"><text:bookmark text:name="p-rc_f3a4f93b99f6a652-326"/>Atualmente, muitas informações turísticas encontram-se dispersas em diferentes plataformas, dificultando o acesso dos usuários a conteúdos relevantes para o planejamento de suas viagens. Nesse contexto, o projeto busca reunir essas informações em uma única solução, facilitando a busca por atrações, restaurantes, hospedagens e experiências compatíveis com os interesses de cada usuário. </text:p>
      <text:p text:style-name="P4"><text:bookmark text:name="p-rc_f3a4f93b99f6a652-327"/>O projeto encontra-se atualmente em fase de desenvolvimento. Embora ainda não exista uma versão funcional completa da aplicação, a etapa de análise e modelagem encontra-se avançada, contando com diagramas UML, levantamento de requisitos funcionais e não funcionais e definição da arquitetura inicial do sistema. </text:p>
      <text:h text:style-name="P3" text:outline-level="2">3. Objetivos do Sistema</text:h>
      <text:list text:style-name="L2">
        <text:list-item>
          <text:p text:style-name="P5"><text:bookmark text:name="p-rc_f3a4f93b99f6a652-328"/><text:span text:style-name="T1">Objetivo Principal:</text:span> Auxiliar usuários no planejamento de viagens por meio de recomendações personalizadas. </text:p>
        </text:list-item>
        <text:list-item>
          <text:p text:style-name="P5"><text:bookmark text:name="p-rc_f3a4f93b99f6a652-329"/><text:span text:style-name="T1">Fatores de Sugestão:</text:span> O sistema busca considerar fatores como preferências pessoais, orçamento disponível, tempo de permanência e perfil do viajante para oferecer sugestões adequadas às necessidades de cada usuário. </text:p>
        </text:list-item>
        <text:list-item>
          <text:p text:style-name="P5"><text:bookmark text:name="p-rc_f3a4f93b99f6a652-330"/><text:span text:style-name="T1">Diferencial:</text:span> Diferentemente das plataformas tradicionais focadas apenas em pontos turísticos populares, a solução pretende recomendar experiências alinhadas aos interesses individuais dos usuários. Dessa forma, uma pessoa interessada em música, gastronomia, esportes ou atividades culturais poderá receber recomendações específicas relacionadas aos seus gostos. </text:p>
        </text:list-item>
        <text:list-item>
          <text:p text:style-name="P5"><text:bookmark text:name="p-rc_f3a4f93b99f6a652-331"/><text:soft-page-break/><text:span text:style-name="T1">Impacto Esperado:</text:span> Espera-se que a plataforma ofereça uma alternativa mais personalizada para descoberta de locais, permitindo que os usuários encontrem atrações que normalmente não conheceriam durante suas viagens. </text:p>
        </text:list-item>
      </text:list>
      <text:h text:style-name="P3" text:outline-level="2">4. Funcionamento Proposto</text:h>
      <text:list text:style-name="L3">
        <text:list-item>
          <text:p text:style-name="P6"><text:bookmark text:name="p-rc_f3a4f93b99f6a652-332"/><text:span text:style-name="T1">Coleta de Dados:</text:span> A solução proposta utiliza informações fornecidas pelos próprios usuários para gerar recomendações personalizadas. Inicialmente, o usuário informa suas preferências, interesses e características de viagem. </text:p>
        </text:list-item>
        <text:list-item>
          <text:p text:style-name="P6"><text:bookmark text:name="p-rc_f3a4f93b99f6a652-333"/><text:span text:style-name="T1">Geração de Sugestões:</text:span> A partir dessas informações, o system identifica locais potencialmente relevantes e sugere experiências compatíveis com seu perfil. </text:p>
        </text:list-item>
        <text:list-item>
          <text:p text:style-name="P6"><text:bookmark text:name="p-rc_f3a4f93b99f6a652-334"/><text:span text:style-name="T1">Roteiros Personalizados:</text:span> A plataforma permite a geração de roteiros personalizados. Para isso, o usuário informa fatores como tempo disponível, orçamento estimado e meio de transporte utilizado. Com base nesses dados, o sistema organiza sugestões de locais e atividades adequadas ao contexto da viagem. </text:p>
        </text:list-item>
      </text:list>
      <text:h text:style-name="P3" text:outline-level="2">5. Escopo da Aplicação</text:h>
      <text:h text:style-name="P7" text:outline-level="3">5.1. Funcionalidades Inclusas</text:h>
      <text:list text:style-name="L4">
        <text:list-item>
          <text:p text:style-name="P8"><text:bookmark text:name="p-rc_f3a4f93b99f6a652-335"/>Busca de locais turísticos, restaurantes e atrações, além da exibição de informações detalhadas sobre cada local. </text:p>
        </text:list-item>
        <text:list-item>
          <text:p text:style-name="P8"><text:bookmark text:name="p-rc_f3a4f93b99f6a652-336"/>Recursos de recomendação personalizada, geração de roteiros, sistema de avaliações, favoritos, informações culturais e orientações de segurança. </text:p>
        </text:list-item>
        <text:list-item>
          <text:p text:style-name="P8"><text:bookmark text:name="p-rc_f3a4f93b99f6a652-337"/>Mecanismos para cadastro e gerenciamento de informações turísticas por administradores e autoridades municipais. </text:p>
        </text:list-item>
      </text:list>
      <text:h text:style-name="P7" text:outline-level="3">5.2. Funcionalidades Excluídas (Fora de Escopo da Versão Inicial)</text:h>
      <text:list text:style-name="L5">
        <text:list-item>
          <text:p text:style-name="P9"><text:bookmark text:name="p-rc_f3a4f93b99f6a652-338"/>Funcionalidades relacionadas à compra de passagens aéreas, rodoviárias ou ferroviárias. </text:p>
        </text:list-item>
        <text:list-item>
          <text:p text:style-name="P9"><text:bookmark text:name="p-rc_f3a4f93b99f6a652-339"/>Reservas de hotéis e hospedagens. </text:p>
        </text:list-item>
        <text:list-item>
          <text:p text:style-name="P9"><text:bookmark text:name="p-rc_f3a4f93b99f6a652-340"/>Processamento de pagamentos online. </text:p>
        </text:list-item>
        <text:list-item>
          <text:p text:style-name="P9"><text:bookmark text:name="p-rc_f3a4f93b99f6a652-341"/>Planejamento colaborativo de viagens entre múltiplos usuários. </text:p>
        </text:list-item>
        <text:list-item>
          <text:p text:style-name="P9"><text:bookmark text:name="p-rc_f3a4f93b99f6a652-342"/>Suporte completo a todos os idiomas existentes (haverá limitações na primeira versão). </text:p>
        </text:list-item>
        <text:list-item>
          <text:p text:style-name="P9"><text:bookmark text:name="p-rc_f3a4f93b99f6a652-343"/>Customização total de recomendações (poderá apresentar limitações iniciais). </text:p>
        </text:list-item>
      </text:list>
      <text:h text:style-name="P3" text:outline-level="2"><text:soft-page-break/>6. Partes Interessadas (Stakeholders)</text:h>
      <text:list text:style-name="L6">
        <text:list-item>
          <text:p text:style-name="P10"><text:bookmark text:name="p-rc_f3a4f93b99f6a652-344"/><text:span text:style-name="T1">Clientes Potenciais:</text:span> Por se tratar de um projeto acadêmico, não existe um cliente formal. No entanto, prefeituras, secretarias municipais de turismo e órgãos responsáveis pela promoção do turismo podem ser considerados clientes potenciais, uma vez que podem utilizar a plataforma para divulgar atrações turísticas e fornecer informações aos visitantes. </text:p>
        </text:list-item>
        <text:list-item>
          <text:p text:style-name="P10"><text:bookmark text:name="p-rc_f3a4f93b99f6a652-345"/><text:span text:style-name="T1">Usuários Principais:</text:span> Viajantes (Travelers), que utilizam a plataforma para pesquisar locais turísticos, gerar roteiros personalizados, consultar informações culturais e de segurança, salvar favoritos e avaliar locais. Também fazem parte deste grupo as autoridades municipais (CityAuthority), responsáveis pelo gerenciamento das informações turísticas de suas respectivas cidades. </text:p>
        </text:list-item>
        <text:list-item>
          <text:p text:style-name="P10"><text:bookmark text:name="p-rc_f3a4f93b99f6a652-346"/><text:span text:style-name="T1">Equipe Técnica:</text:span> Composta pelos estudantes Ricardo Akimoto, Felipe Leite Conrado e André, responsáveis pelo levantamento de requisitos, modelagem do sistema, desenvolvimento, testes, documentação e apresentação do projeto. </text:p>
        </text:list-item>
        <text:list-item>
          <text:p text:style-name="P10"><text:bookmark text:name="p-rc_f3a4f93b99f6a652-347"/><text:span text:style-name="T1">Gestores do Projeto:</text:span> Representados pelos professores orientadores e avaliadores da disciplina, que acompanham o desenvolvimento do trabalho, fornecem orientações técnicas e realizam a avaliação dos resultados obtidos pela equipe. </text:p>
        </text:list-item>
        <text:list-item>
          <text:p text:style-name="P10"><text:bookmark text:name="p-rc_f3a4f93b99f6a652-348"/><text:span text:style-name="T1">Parceiros Potenciais:</text:span> Prefeituras, secretarias de turismo, estabelecimentos turísticos, hotéis, restaurantes e demais organizações que possam contribuir com informações relevantes para a plataforma. </text:p>
        </text:list-item>
        <text:list-item>
          <text:p text:style-name="P10"><text:bookmark text:name="p-rc_f3a4f93b99f6a652-349"/><text:span text:style-name="T1">Fornecedores de Tecnologia:</text:span> Google Maps Platform e a API de tradução utilizada pelo sistema, essenciais para a disponibilização de recursos de geolocalização, roteirização e suporte multilíngue. </text:p>
        </text:list-item>
      </text:list>
      <text:h text:style-name="P3" text:outline-level="2">7. Perfis de Usuário (Personas)</text:h>
      <text:p text:style-name="P4"><text:bookmark text:name="p-rc_f3a4f93b99f6a652-350"/>Para compreender melhor as necessidades dos usuários do sistema, foram definidas personas que representam os principais perfis de viajantes que utilizarão a plataforma NomadGuide. </text:p>
      <text:h text:style-name="P7" text:outline-level="3">Viajantes (Travelers)</text:h>
      <text:list text:style-name="L7">
        <text:list-item>
          <text:p text:style-name="P11"><text:bookmark text:name="p-rc_f3a4f93b99f6a652-351"/><text:span text:style-name="T1">Lucas Silva:</text:span> É um jovem viajante que busca experiências diferenciadas e atividades ao ar livre. Seu principal interesse está na descoberta de trilhas, parques, atrações naturais e locais pouco explorados pelos turistas <text:soft-page-break/>convencionais. Ele valoriza informações detalhadas sobre destinos, segurança, acessibilidade e opções de lazer que proporcionem contato com a natureza. Ao utilizar o NomadGuide, Lucas espera encontrar recomendações personalizadas que estejam alinhadas ao seu perfil aventureiro, além de roteiros que priorizem experiências únicas e atividades de exploração. </text:p>
        </text:list-item>
        <text:list-item>
          <text:p text:style-name="P11"><text:bookmark text:name="p-rc_f3a4f93b99f6a652-352"/><text:span text:style-name="T1">Marina Costa:</text:span> Representa o perfil de usuário que busca praticidade e organização durante suas viagens. Ela prefere planejar seus passeios de forma eficiente, otimizando tempo e orçamento. Seu interesse está em encontrar rapidamente informações confiáveis sobre atrações, hospedagens, restaurantes e deslocamentos. Para Marina, o NomadGuide deve oferecer uma experiência simples e intuitiva, permitindo a criação de roteiros organizados, a comparação de opções disponíveis e o acesso rápido às informações necessárias para a tomada de decisões. </text:p>
        </text:list-item>
        <text:list-item>
          <text:p text:style-name="P11"><text:bookmark text:name="p-rc_f3a4f93b99f6a652-353"/><text:span text:style-name="T1">John Miller:</text:span> É um turista estrangeiro que visita diferentes países em busca de experiências culturais e conhecimento sobre novos destinos. Por não estar familiarizado com a cultura local, ele necessita de informações claras sobre costumes, segurança, localização de atrações e aspectos culturais relevantes. Ao utilizar o NomadGuide, John espera encontrar informações acessíveis que facilitem sua adaptação ao destino visitado, contribuindo para uma experiência de viagem mais segura, confortável e enriquecedora. </text:p>
        </text:list-item>
      </text:list>
      <text:h text:style-name="P7" text:outline-level="3">Usuários Administrativos</text:h>
      <text:p text:style-name="P4"><text:bookmark text:name="p-rc_f3a4f93b99f6a652-354"/>Além dos viajantes, o sistema conta com usuários administrativos responsáveis pela manutenção das informações disponibilizadas na plataforma: </text:p>
      <text:list text:style-name="L8">
        <text:list-item>
          <text:p text:style-name="P12"><text:bookmark text:name="p-rc_f3a4f93b99f6a652-355"/><text:span text:style-name="T1">CityAuthority:</text:span> Representa os responsáveis pela gestão das informações turísticas de uma determinada cidade. Esses usuários possuem permissão para cadastrar e atualizar atrações, restaurantes, hotéis e demais conteúdos relacionados ao município ao qual estão vinculados. </text:p>
        </text:list-item>
        <text:list-item>
          <text:p text:style-name="P12"><text:bookmark text:name="p-rc_f3a4f93b99f6a652-356"/><text:span text:style-name="T1">Developer (Administradores Globais):</text:span> Representa os administradores globais do sistema. Possuem acesso completo às funcionalidades de gerenciamento da plataforma, podendo cadastrar, editar e remover informações em qualquer cidade cadastrada no sistema. </text:p>
        </text:list-item>
      </text:list>
      <text:h text:style-name="P3" text:outline-level="2"><text:soft-page-break/>8. Matriz de Alinhamento (Problema, Impacto e Oportunidade)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3"><text:span text:style-name="Strong_20_Emphasis"><text:span text:style-name="T2">Problema ODT</text:span></text:span></text:p>
            </table:table-cell>
            <table:table-cell table:style-name="Tabela1.A1" office:value-type="string">
              <text:p text:style-name="P13"><text:span text:style-name="Strong_20_Emphasis"><text:span text:style-name="T2">Impacto ODT</text:span></text:span></text:p>
            </table:table-cell>
            <table:table-cell table:style-name="Tabela1.A1" office:value-type="string">
              <text:p text:style-name="P13"><text:span text:style-name="Strong_20_Emphasis"><text:span text:style-name="T2">Oportunidade ODT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14"><text:bookmark text:name="p-rc_f3a4f93b99f6a652-360"/>Informações turísticas dispersas em diferentes plataformas <text:span text:style-name="T3"/></text:p>
          </table:table-cell>
          <table:table-cell table:style-name="Tabela1.A1" office:value-type="string">
            <text:p text:style-name="P14"><text:bookmark text:name="p-rc_f3a4f93b99f6a652-361"/>O usuário precisa consultar diversos sites e aplicativos para planejar uma viagem <text:span text:style-name="T3"/></text:p>
          </table:table-cell>
          <table:table-cell table:style-name="Tabela1.A1" office:value-type="string">
            <text:p text:style-name="P14"><text:bookmark text:name="p-rc_f3a4f93b99f6a652-362"/>Centralizar informações turísticas em uma única plataforma <text:span text:style-name="T3"/></text:p>
          </table:table-cell>
        </table:table-row>
        <table:table-row>
          <table:table-cell table:style-name="Tabela1.A1" office:value-type="string">
            <text:p text:style-name="P14"><text:bookmark text:name="p-rc_f3a4f93b99f6a652-363"/>Dificuldade em encontrar atrações adequadas ao perfil do viajante <text:span text:style-name="T3"/></text:p>
          </table:table-cell>
          <table:table-cell table:style-name="Tabela1.A1" office:value-type="string">
            <text:p text:style-name="P14"><text:bookmark text:name="p-rc_f3a4f93b99f6a652-364"/>Experiência de viagem menos satisfatória <text:span text:style-name="T3"/></text:p>
          </table:table-cell>
          <table:table-cell table:style-name="Tabela1.A1" office:value-type="string">
            <text:p text:style-name="P14"><text:bookmark text:name="p-rc_f3a4f93b99f6a652-365"/>Oferecer recomendações personalizadas com base no perfil do usuário <text:span text:style-name="T3"/></text:p>
          </table:table-cell>
        </table:table-row>
        <table:table-row>
          <table:table-cell table:style-name="Tabela1.A1" office:value-type="string">
            <text:p text:style-name="P14"><text:bookmark text:name="p-rc_f3a4f93b99f6a652-366"/>Falta de conhecimento sobre aspectos culturais do destino <text:span text:style-name="T3"/></text:p>
          </table:table-cell>
          <table:table-cell table:style-name="Tabela1.A1" office:value-type="string">
            <text:p text:style-name="P14"><text:bookmark text:name="p-rc_f3a4f93b99f6a652-367"/>Possíveis dificuldades de adaptação e interação com a cultura local <text:span text:style-name="T3"/></text:p>
          </table:table-cell>
          <table:table-cell table:style-name="Tabela1.A1" office:value-type="string">
            <text:p text:style-name="P14"><text:bookmark text:name="p-rc_f3a4f93b99f6a652-368"/>Disponibilizar informações culturais relevantes sobre cada local <text:span text:style-name="T3"/></text:p>
          </table:table-cell>
        </table:table-row>
        <table:table-row>
          <table:table-cell table:style-name="Tabela1.A1" office:value-type="string">
            <text:p text:style-name="P14"><text:bookmark text:name="p-rc_f3a4f93b99f6a652-369"/>Falta de informações sobre segurança dos destinos <text:span text:style-name="T3"/></text:p>
          </table:table-cell>
          <table:table-cell table:style-name="Tabela1.A1" office:value-type="string">
            <text:p text:style-name="P14"><text:bookmark text:name="p-rc_f3a4f93b99f6a652-370"/>Maior insegurança durante a viagem <text:span text:style-name="T3"/></text:p>
          </table:table-cell>
          <table:table-cell table:style-name="Tabela1.A1" office:value-type="string">
            <text:p text:style-name="P14"><text:bookmark text:name="p-rc_f3a4f93b99f6a652-371"/>Fornecer informações de segurança e orientações aos visitantes <text:span text:style-name="T3"/></text:p>
          </table:table-cell>
        </table:table-row>
        <table:table-row>
          <table:table-cell table:style-name="Tabela1.A1" office:value-type="string">
            <text:p text:style-name="P14"><text:bookmark text:name="p-rc_f3a4f93b99f6a652-372"/>Planejamento manual de roteiros turísticos <text:span text:style-name="T3"/></text:p>
          </table:table-cell>
          <table:table-cell table:style-name="Tabela1.A1" office:value-type="string">
            <text:p text:style-name="P14"><text:bookmark text:name="p-rc_f3a4f93b99f6a652-373"/>Processo demorado e pouco eficiente <text:span text:style-name="T3"/></text:p>
          </table:table-cell>
          <table:table-cell table:style-name="Tabela1.A1" office:value-type="string">
            <text:p text:style-name="P14"><text:bookmark text:name="p-rc_f3a4f93b99f6a652-374"/>Gerar roteiros personalizados automaticamente <text:span text:style-name="T3"/></text:p>
          </table:table-cell>
        </table:table-row>
        <table:table-row>
          <table:table-cell table:style-name="Tabela1.A1" office:value-type="string">
            <text:p text:style-name="P14"><text:bookmark text:name="p-rc_f3a4f93b99f6a652-375"/>Pouca visibilidade de atrações turísticas locais <text:span text:style-name="T3"/></text:p>
          </table:table-cell>
          <table:table-cell table:style-name="Tabela1.A1" office:value-type="string">
            <text:p text:style-name="P14"><text:bookmark text:name="p-rc_f3a4f93b99f6a652-376"/>Redução do potencial turístico de determinadas regiões <text:span text:style-name="T3"/></text:p>
          </table:table-cell>
          <table:table-cell table:style-name="Tabela1.A1" office:value-type="string">
            <text:p text:style-name="P14"><text:bookmark text:name="p-rc_f3a4f93b99f6a652-377"/>Permitir que municípios divulguem seus pontos turísticos <text:span text:style-name="T3"/></text:p>
          </table:table-cell>
        </table:table-row>
        <table:table-row>
          <table:table-cell table:style-name="Tabela1.A1" office:value-type="string">
            <text:p text:style-name="P14"><text:bookmark text:name="p-rc_f3a4f93b99f6a652-378"/>Informações desatualizadas sobre locais turísticos <text:span text:style-name="T3"/></text:p>
          </table:table-cell>
          <table:table-cell table:style-name="Tabela1.A1" office:value-type="string">
            <text:p text:style-name="P14"><text:bookmark text:name="p-rc_f3a4f93b99f6a652-379"/>Experiência negativa para os usuários <text:span text:style-name="T3"/></text:p>
          </table:table-cell>
          <table:table-cell table:style-name="Tabela1.A1" office:value-type="string">
            <text:p text:style-name="P14"><text:bookmark text:name="p-rc_f3a4f93b99f6a652-380"/>Possibilitar atualização contínua por administradores e autoridades municipais <text:span text:style-name="T3"/></text:p>
          </table:table-cell>
        </table:table-row>
        <table:table-row>
          <table:table-cell table:style-name="Tabela1.A1" office:value-type="string">
            <text:p text:style-name="P14"><text:bookmark text:name="p-rc_f3a4f93b99f6a652-381"/>Dificuldade em <text:soft-page-break/>organizar locais de interesse <text:span text:style-name="T3"/></text:p>
          </table:table-cell>
          <table:table-cell table:style-name="Tabela1.A1" office:value-type="string">
            <text:p text:style-name="P14"><text:bookmark text:name="p-rc_f3a4f93b99f6a652-382"/>Perda de informações <text:soft-page-break/>importantes durante o planejamento da viagem <text:span text:style-name="T3"/></text:p>
          </table:table-cell>
          <table:table-cell table:style-name="Tabela1.A1" office:value-type="string">
            <text:p text:style-name="P14"><text:bookmark text:name="p-rc_f3a4f93b99f6a652-383"/>Disponibilizar sistema de <text:soft-page-break/>favoritos para salvar atrações <text:span text:style-name="T3"/></text:p>
          </table:table-cell>
        </table:table-row>
        <table:table-row>
          <table:table-cell table:style-name="Tabela1.A1" office:value-type="string">
            <text:p text:style-name="P14"><text:bookmark text:name="p-rc_f3a4f93b99f6a652-384"/>Falta de avaliações confiáveis sobre locais turísticos <text:span text:style-name="T3"/></text:p>
          </table:table-cell>
          <table:table-cell table:style-name="Tabela1.A1" office:value-type="string">
            <text:p text:style-name="P14"><text:bookmark text:name="p-rc_f3a4f93b99f6a652-385"/>Decisões baseadas em informações insuficientes <text:span text:style-name="T3"/></text:p>
          </table:table-cell>
          <table:table-cell table:style-name="Tabela1.A1" office:value-type="string">
            <text:p text:style-name="P14"><text:bookmark text:name="p-rc_f3a4f93b99f6a652-386"/>Permitir avaliações e comentários dos usuários <text:span text:style-name="T3"/></text:p>
          </table:table-cell>
        </table:table-row>
        <table:table-row>
          <table:table-cell table:style-name="Tabela1.A1" office:value-type="string">
            <text:p text:style-name="P14"><text:bookmark text:name="p-rc_f3a4f93b99f6a652-387"/>Ausência de uma plataforma integrada para turistas nacionais e internacionais <text:span text:style-name="T3"/></text:p>
          </table:table-cell>
          <table:table-cell table:style-name="Tabela1.A1" office:value-type="string">
            <text:p text:style-name="P14"><text:bookmark text:name="p-rc_f3a4f93b99f6a652-388"/>Maior dificuldade de acesso às informações <text:span text:style-name="T3"/></text:p>
          </table:table-cell>
          <table:table-cell table:style-name="Tabela1.A1" office:value-type="string">
            <text:p text:style-name="P14"><text:bookmark text:name="p-rc_f3a4f93b99f6a652-389"/>Desenvolver uma solução centralizada voltada para diferentes perfis de viajantes <text:span text:style-name="T3"/></text:p>
          </table:table-cell>
        </table:table-row>
      </table:table>
      <text:h text:style-name="P3" text:outline-level="2">9. Justificativa e Necessidades Operacionais</text:h>
      <text:p text:style-name="P4"><text:bookmark text:name="p-rc_f3a4f93b99f6a652-390"/>O Projeto Turismo surge da necessidade de disponibilizar uma plataforma centralizada para consulta e divulgação de informações turísticas. Atualmente, muitas informações relevantes encontram-se distribuídas em diferentes meios, dificultando o acesso por parte dos viajantes. O sistema busca organizar esses dados em um único ambiente, permitindo uma experiência mais eficiente e intuitiva para os usuários. </text:p>
      <text:p text:style-name="P4"><text:bookmark text:name="p-rc_f3a4f93b99f6a652-391"/>Além disso, existe a necessidade de fornecer aos administradores e autoridades municipais uma ferramenta capaz de gerenciar informações sobre atrações turísticas, hotéis, restaurantes e demais pontos de interesse, garantindo maior controle sobre os dados disponibilizados ao público. </text:p>
      <text:h text:style-name="P7" text:outline-level="3">Necessidades do Sistema:</text:h>
      <text:list text:style-name="L9">
        <text:list-item>
          <text:p text:style-name="P15"><text:bookmark text:name="p-rc_f3a4f93b99f6a652-392"/>O sistema deve permitir o cadastro e gerenciamento de locais turísticos, possibilitando que as informações permaneçam atualizadas e acessíveis. </text:p>
        </text:list-item>
        <text:list-item>
          <text:p text:style-name="P15"><text:bookmark text:name="p-rc_f3a4f93b99f6a652-393"/>Deve oferecer mecanismos de busca, filtragem e recomendação de locais de interesse, facilitando o planejamento de viagens. </text:p>
        </text:list-item>
        <text:list-item>
          <text:p text:style-name="P15"><text:bookmark text:name="p-rc_f3a4f93b99f6a652-394"/>Geração de roteiros personalizados, levando em consideração as preferências dos usuários. </text:p>
        </text:list-item>
        <text:list-item>
          <text:p text:style-name="P15"><text:bookmark text:name="p-rc_f3a4f93b99f6a652-395"/>Disponibilizar recursos para avaliação de locais, armazenamento de favoritos e consulta de informações culturais e de segurança. </text:p>
        </text:list-item>
      </text:list>
      <text:h text:style-name="P7" text:outline-level="3"><text:soft-page-break/>Metas Estratégicas:</text:h>
      <text:list text:style-name="L10">
        <text:list-item>
          <text:p text:style-name="P16"><text:bookmark text:name="p-rc_f3a4f93b99f6a652-396"/>A principal meta estratégica é promover uma experiência mais completa e personalizada para viajantes, auxiliando-os na descoberta e planejamento de destinos turísticos. </text:p>
        </text:list-item>
        <text:list-item>
          <text:p text:style-name="P16"><text:bookmark text:name="p-rc_f3a4f93b99f6a652-397"/>Incentivar a divulgação de atrações locais e contribuir para o fortalecimento do turismo regional. </text:p>
        </text:list-item>
        <text:list-item>
          <text:p text:style-name="P16"><text:bookmark text:name="p-rc_f3a4f93b99f6a652-398"/>Demonstrar a aplicação prática dos conceitos de Engenharia de Software, análise de requisitos, modelagem UML e desenvolvimento de sistemas, servindo como uma solução acadêmica capaz de atender necessidades reais do setor turístico. </text:p>
        </text:list-item>
      </text:list>
      <text:h text:style-name="P3" text:outline-level="2">10. Características e Recursos Gerais do Sistema</text:h>
      <text:list text:style-name="L11">
        <text:list-item>
          <text:p text:style-name="P17"><text:bookmark text:name="p-rc_f3a4f93b99f6a652-399"/><text:span text:style-name="T1">Gerenciamento de Usuários:</text:span> O sistema permite o cadastro, autenticação e gerenciamento de usuários. Existem diferentes perfis de acesso, incluindo viajantes, autoridades municipais e administradores globais, cada um com permissões específicas dentro da plataforma. </text:p>
        </text:list-item>
        <text:list-item>
          <text:p text:style-name="P17"><text:bookmark text:name="p-rc_f3a4f93b99f6a652-400"/><text:span text:style-name="T1">Pesquisa de Locais:</text:span> Os usuários podem pesquisar atrações turísticas, restaurantes, hotéis e outros pontos de interesse. O sistema disponibiliza informações detalhadas sobre cada local, incluindo descrição, localização, categoria, avaliações, informações culturais e orientações de segurança. </text:p>
        </text:list-item>
        <text:list-item>
          <text:p text:style-name="P17"><text:bookmark text:name="p-rc_f3a4f93b99f6a652-401"/><text:span text:style-name="T1">Favoritos:</text:span> Os viajantes podem salvar locais de interesse em uma lista de favoritos, facilitando o planejamento de futuras viagens e o acesso rápido aos destinos desejados. </text:p>
        </text:list-item>
        <text:list-item>
          <text:p text:style-name="P17"><text:bookmark text:name="p-rc_f3a4f93b99f6a652-402"/><text:span text:style-name="T1">Avaliações Colaborativas:</text:span> O sistema permite que os usuários registrem avaliações e comentários sobre os locais visitados, contribuindo para a construção de uma base colaborativa de informações e experiências. </text:p>
        </text:list-item>
        <text:list-item>
          <text:p text:style-name="P17"><text:bookmark text:name="p-rc_f3a4f93b99f6a652-403"/><text:span text:style-name="T1">Roteiros Inteligentes:</text:span> A plataforma auxilia os viajantes na criação de roteiros de viagem personalizados, considerando fatores como tempo disponível, orçamento, preferências e perfil turístico do usuário. </text:p>
        </text:list-item>
        <text:list-item>
          <text:p text:style-name="P17"><text:bookmark text:name="p-rc_f3a4f93b99f6a652-404"/><text:span text:style-name="T1">Níveis de Permissão:</text:span> As autoridades municipais podem cadastrar e atualizar informações referentes aos locais turísticos de suas cidades, enquanto os administradores possuem acesso global para gerenciamento de todo o conteúdo da plataforma. </text:p>
        </text:list-item>
        <text:list-item>
          <text:p text:style-name="P17"><text:bookmark text:name="p-rc_f3a4f93b99f6a652-405"/><text:soft-page-break/><text:span text:style-name="T1">Cultura e Segurança:</text:span> O sistema disponibiliza informações relacionadas à cultura local, costumes e níveis de segurança dos destinos cadastrados, contribuindo para uma experiência turística mais segura e informada. </text:p>
        </text:list-item>
        <text:list-item>
          <text:p text:style-name="P17"><text:bookmark text:name="p-rc_f3a4f93b99f6a652-406"/><text:span text:style-name="T1">Filtros Avançados:</text:span> Os usuários podem utilizar filtros de pesquisa para localizar destinos de acordo com critérios específicos, como categoria, distância, disponibilidade e características desejadas. </text:p>
        </text:list-item>
      </text:list>
      <text:h text:style-name="P3" text:outline-level="2">11. Requisitos Funcionais (RF)</text:h>
      <text:list text:style-name="L12">
        <text:list-item>
          <text:p text:style-name="P18"><text:bookmark text:name="p-rc_f3a4f93b99f6a652-407"/><text:span text:style-name="T1">RF01:</text:span> O sistema deve permitir ao usuário pesquisar locais por nome, categoria ou localização atual, retornando resultados relevantes com base na consulta. </text:p>
        </text:list-item>
        <text:list-item>
          <text:p text:style-name="P18"><text:bookmark text:name="p-rc_f3a4f93b99f6a652-408"/><text:span text:style-name="T1">RF02:</text:span> O sistema deve organizar os locais em categorias como turismo, alimentação e experiências. </text:p>
        </text:list-item>
        <text:list-item>
          <text:p text:style-name="P18"><text:bookmark text:name="p-rc_f3a4f93b99f6a652-409"/><text:span text:style-name="T1">RF03:</text:span> O sistema deve exibir informações completas do local selecionado, incluindo descrição, imagens, horário de funcionamento e faixa de preço. </text:p>
        </text:list-item>
        <text:list-item>
          <text:p text:style-name="P18"><text:bookmark text:name="p-rc_f3a4f93b99f6a652-410"/><text:span text:style-name="T1">RF04:</text:span> O sistema deve informar se o local está aberto ou fechado com base no horário atual. </text:p>
        </text:list-item>
        <text:list-item>
          <text:p text:style-name="P18"><text:bookmark text:name="p-rc_f3a4f93b99f6a652-411"/><text:span text:style-name="T1">RF05:</text:span> O sistema deve permitir filtrar locais por faixa de preço. </text:p>
        </text:list-item>
        <text:list-item>
          <text:p text:style-name="P18"><text:bookmark text:name="p-rc_f3a4f93b99f6a652-412"/><text:span text:style-name="T1">RF06:</text:span> O sistema deve exibir a média das avaliações e quantidade de avaliações de cada local. </text:p>
        </text:list-item>
        <text:list-item>
          <text:p text:style-name="P18"><text:bookmark text:name="p-rc_f3a4f93b99f6a652-413"/><text:span text:style-name="T1">RF07:</text:span> O sistema deve permitir visualizar comentários feitos por outros usuários. </text:p>
        </text:list-item>
        <text:list-item>
          <text:p text:style-name="P18"><text:bookmark text:name="p-rc_f3a4f93b99f6a652-414"/><text:span text:style-name="T1">RF08:</text:span> O sistema deve gerar rotas automaticamente com base no tempo disponível, localização atual e preferências do usuário. </text:p>
        </text:list-item>
        <text:list-item>
          <text:p text:style-name="P18"><text:bookmark text:name="p-rc_f3a4f93b99f6a652-415"/><text:span text:style-name="T1">RF09:</text:span> O sistema deve oferecer roteiros pré-definidos com sequência organizada de locais. </text:p>
        </text:list-item>
        <text:list-item>
          <text:p text:style-name="P18"><text:bookmark text:name="p-rc_f3a4f93b99f6a652-416"/><text:span text:style-name="T1">RF10:</text:span> O sistema deve organizar a ordem dos locais visando minimizar tempo e distância de deslocamento. </text:p>
        </text:list-item>
        <text:list-item>
          <text:p text:style-name="P18"><text:bookmark text:name="p-rc_f3a4f93b99f6a652-417"/><text:span text:style-name="T1">RF11:</text:span> O sistema deve permitir selecionar diferentes meios de transporte para adaptação da rota. </text:p>
        </text:list-item>
        <text:list-item>
          <text:p text:style-name="P18"><text:bookmark text:name="p-rc_f3a4f93b99f6a652-418"/><text:span text:style-name="T1">RF12:</text:span> O sistema deve exibir as rotas geradas em mapa com tempo estimado de deslocamento. </text:p>
        </text:list-item>
        <text:list-item>
          <text:p text:style-name="P18"><text:bookmark text:name="p-rc_f3a4f93b99f6a652-419"/><text:span text:style-name="T1">RF13:</text:span> O sistema deve destacar locais com melhor relação entre qualidade e preço. </text:p>
        </text:list-item>
        <text:list-item>
          <text:p text:style-name="P18"><text:bookmark text:name="p-rc_f3a4f93b99f6a652-420"/><text:soft-page-break/><text:span text:style-name="T1">RF14:</text:span> O sistema deve adaptar recomendações de acordo com o perfil do usuário. </text:p>
        </text:list-item>
        <text:list-item>
          <text:p text:style-name="P18"><text:bookmark text:name="p-rc_f3a4f93b99f6a652-421"/><text:span text:style-name="T1">RF15:</text:span> O sistema deve destacar locais menos conhecidos que possuam boas avaliações. </text:p>
        </text:list-item>
        <text:list-item>
          <text:p text:style-name="P18"><text:bookmark text:name="p-rc_f3a4f93b99f6a652-422"/><text:span text:style-name="T1">RF16:</text:span> O sistema deve permitir a utilização da interface em diferentes idiomas. </text:p>
        </text:list-item>
        <text:list-item>
          <text:p text:style-name="P18"><text:bookmark text:name="p-rc_f3a4f93b99f6a652-423"/><text:span text:style-name="T1">RF17:</text:span> O sistema deve traduzir automaticamente conteúdos relevantes para o idioma do usuário. </text:p>
        </text:list-item>
        <text:list-item>
          <text:p text:style-name="P18"><text:bookmark text:name="p-rc_f3a4f93b99f6a652-424"/><text:span text:style-name="T1">RF18:</text:span> O sistema deve exibir informações sobre segurança, cultura local e dicas úteis para turistas. </text:p>
        </text:list-item>
        <text:list-item>
          <text:p text:style-name="P18"><text:bookmark text:name="p-rc_f3a4f93b99f6a652-425"/><text:span text:style-name="T1">RF19:</text:span> O sistema deve permitir que o usuário salve locais favoritos. </text:p>
        </text:list-item>
        <text:list-item>
          <text:p text:style-name="P18"><text:bookmark text:name="p-rc_f3a4f93b99f6a652-426"/><text:span text:style-name="T1">RF20:</text:span> O sistema deve permitir armazenar roteiros para utilização futura. </text:p>
        </text:list-item>
        <text:list-item>
          <text:p text:style-name="P18"><text:bookmark text:name="p-rc_f3a4f93b99f6a652-427"/><text:span text:style-name="T1">RF21:</text:span> O sistema deve atualizar a localização do usuário mediante consentimento. </text:p>
        </text:list-item>
        <text:list-item>
          <text:p text:style-name="P18"><text:bookmark text:name="p-rc_f3a4f93b99f6a652-428"/><text:span text:style-name="T1">RF22:</text:span> O sistema deve priorizar rotas consideradas seguras para o usuário. </text:p>
        </text:list-item>
        <text:list-item>
          <text:p text:style-name="P18"><text:bookmark text:name="p-rc_f3a4f93b99f6a652-429"/><text:span text:style-name="T1">RF23:</text:span> O sistema deve apresentar recomendações baseadas em curadoria especializada. </text:p>
        </text:list-item>
        <text:list-item>
          <text:p text:style-name="P18"><text:bookmark text:name="p-rc_f3a4f93b99f6a652-430"/><text:span text:style-name="T1">RF24:</text:span> O sistema deve permitir avaliações simples e avaliações detalhadas. </text:p>
        </text:list-item>
      </text:list>
      <text:h text:style-name="P3" text:outline-level="2">12. Requisitos Não Funcionais (RNF)</text:h>
      <text:list text:style-name="L13">
        <text:list-item>
          <text:p text:style-name="P19"><text:bookmark text:name="p-rc_f3a4f93b99f6a652-431"/><text:span text:style-name="T1">RNF01 (Desempenho):</text:span> O sistema deve retornar resultados de busca em até dois segundos. </text:p>
        </text:list-item>
        <text:list-item>
          <text:p text:style-name="P19"><text:bookmark text:name="p-rc_f3a4f93b99f6a652-432"/><text:span text:style-name="T1">RNF02 (Desempenho):</text:span> O sistema deve gerar rotas em até três segundos. </text:p>
        </text:list-item>
        <text:list-item>
          <text:p text:style-name="P19"><text:bookmark text:name="p-rc_f3a4f93b99f6a652-433"/><text:span text:style-name="T1">RNF03 (Usabilidade):</text:span> O usuário deve conseguir gerar um roteiro completo com no máximo três interações principais. </text:p>
        </text:list-item>
        <text:list-item>
          <text:p text:style-name="P19"><text:bookmark text:name="p-rc_f3a4f93b99f6a652-434"/><text:span text:style-name="T1">RNF04 (Escalabilidade):</text:span> O sistema deve suportar pelo menos 10.000 usuários simultâneos. </text:p>
        </text:list-item>
        <text:list-item>
          <text:p text:style-name="P19"><text:bookmark text:name="p-rc_f3a4f93b99f6a652-435"/><text:span text:style-name="T1">RNF05 (Disponibilidade):</text:span> O sistema deve permanecer disponível pelo menos 99% do tempo. </text:p>
        </text:list-item>
        <text:list-item>
          <text:p text:style-name="P19"><text:bookmark text:name="p-rc_f3a4f93b99f6a652-436"/><text:span text:style-name="T1">RNF06 (Confiabilidade):</text:span> O sistema deve permitir acesso a dados previamente armazenados sem conexão com a internet. </text:p>
        </text:list-item>
        <text:list-item>
          <text:p text:style-name="P19"><text:bookmark text:name="p-rc_f3a4f93b99f6a652-437"/><text:span text:style-name="T1">RNF07 (Adaptabilidade):</text:span> O sistema deve permitir troca dinâmica de idioma sem reinicialização. </text:p>
        </text:list-item>
        <text:list-item>
          <text:p text:style-name="P19"><text:bookmark text:name="p-rc_f3a4f93b99f6a652-438"/><text:soft-page-break/><text:span text:style-name="T1">RNF08 (Segurança):</text:span> O sistema deve utilizar HTTPS para proteção dos dados em trânsito. </text:p>
        </text:list-item>
        <text:list-item>
          <text:p text:style-name="P19"><text:bookmark text:name="p-rc_f3a4f93b99f6a652-439"/><text:span text:style-name="T1">RNF09 (Robustez):</text:span> O sistema deve informar adequadamente falhas de GPS, conexão ou serviços externos. </text:p>
        </text:list-item>
        <text:list-item>
          <text:p text:style-name="P19"><text:bookmark text:name="p-rc_f3a4f93b99f6a652-440"/><text:span text:style-name="T1">RNF10 (Usabilidade):</text:span> O sistema deve carregar mapas e informações de forma gradual. </text:p>
        </text:list-item>
        <text:list-item>
          <text:p text:style-name="P19"><text:bookmark text:name="p-rc_f3a4f93b99f6a652-441"/><text:span text:style-name="T1">RNF11 (Portabilidade):</text:span> O sistema deve funcionar em dispositivos Android modernos. </text:p>
        </text:list-item>
        <text:list-item>
          <text:p text:style-name="P19"><text:bookmark text:name="p-rc_f3a4f93b99f6a652-442"/><text:span text:style-name="T1">RNF12 (Eficiência):</text:span> O sistema deve otimizar o uso do GPS para reduzir o consumo energético. </text:p>
        </text:list-item>
        <text:list-item>
          <text:p text:style-name="P19"><text:bookmark text:name="p-rc_f3a4f93b99f6a652-443"/><text:span text:style-name="T1">RNF13 (Acessibilidade):</text:span> A interface deve ser compreensível para usuários que não falam o idioma local. </text:p>
        </text:list-item>
        <text:list-item>
          <text:p text:style-name="P19"><text:bookmark text:name="p-rc_f3a4f93b99f6a652-444"/><text:span text:style-name="T1">RNF14 (Arquitetura):</text:span> O sistema deve possuir arquitetura desacoplada para facilitar manutenção e evolução. </text:p>
        </text:list-item>
        <text:list-item>
          <text:p text:style-name="P19"><text:bookmark text:name="p-rc_f3a4f93b99f6a652-445"/><text:span text:style-name="T1">RNF15 (Interoperabilidade):</text:span> O sistema deve integrar-se com APIs de mapas, localização e tradução. </text:p>
        </text:list-item>
      </text:list>
      <text:h text:style-name="P3" text:outline-level="2">13. Regras de Negócio (RN)</text:h>
      <text:list text:style-name="L14">
        <text:list-item>
          <text:p text:style-name="P20"><text:bookmark text:name="p-rc_f3a4f93b99f6a652-446"/><text:span text:style-name="T1">RN01 (Acesso Restrito):</text:span> O sistema deverá garantir que apenas usuários autenticados tenham acesso às funcionalidades personalizadas, como salvar locais favoritos, gerar roteiros e armazenar informações pessoais. </text:p>
        </text:list-item>
        <text:list-item>
          <text:p text:style-name="P20"><text:bookmark text:name="p-rc_f3a4f93b99f6a652-447"/><text:span text:style-name="T1">RN02 (Rastreabilidade):</text:span> As avaliações e comentários cadastrados deverão estar vinculados a um usuário e a um local específico, permitindo a rastreabilidade das informações apresentadas na plataforma. </text:p>
        </text:list-item>
        <text:list-item>
          <text:p text:style-name="P20"><text:bookmark text:name="p-rc_f3a4f93b99f6a652-448"/><text:span text:style-name="T1">RN03 (Localização Geográfica):</text:span> Cada local turístico deverá pertencer a uma única cidade e possuir informações de localização válidas para que possa ser encontrado por meio das ferramentas de pesquisa e roteirização. </text:p>
        </text:list-item>
        <text:list-item>
          <text:p text:style-name="P20"><text:bookmark text:name="p-rc_f3a4f93b99f6a652-449"/><text:span text:style-name="T1">RN04 (Restrição de Escopo CityAuthority):</text:span> Os usuários do tipo CityAuthority poderão cadastrar, editar e atualizar apenas informações referentes à cidade pela qual são responsáveis. </text:p>
        </text:list-item>
        <text:list-item>
          <text:p text:style-name="P20"><text:bookmark text:name="p-rc_f3a4f93b99f6a652-450"/><text:span text:style-name="T1">RN05 (Permissão Global Developer):</text:span> Já os usuários do tipo Developer possuirão permissões globais para gerenciar informações de qualquer cidade cadastrada no sistema. </text:p>
        </text:list-item>
        <text:list-item>
          <text:p text:style-name="P20"><text:bookmark text:name="p-rc_f3a4f93b99f6a652-451"/><text:soft-page-break/><text:span text:style-name="T1">RN06 (Parâmetros de Rota):</text:span> As rotas geradas deverão considerar os parâmetros informados pelo usuário, como tempo disponível, localização atual e meio de transporte selecionado. </text:p>
        </text:list-item>
        <text:list-item>
          <text:p text:style-name="P20"><text:bookmark text:name="p-rc_f3a4f93b99f6a652-452"/><text:span text:style-name="T1">RN07 (Priorização de Perfil):</text:span> Além disso, o sistema deverá priorizar a apresentação de informações relevantes para o perfil do viajante, oferecendo recomendações personalizadas quando possível. </text:p>
        </text:list-item>
        <text:list-item>
          <text:p text:style-name="P20"><text:bookmark text:name="p-rc_f3a4f93b99f6a652-453"/><text:span text:style-name="T1">RN08 (Consistência de Dados):</text:span> As informações exibidas pela plataforma deverão respeitar critérios mínimos de consistência e atualização, visando fornecer dados confiáveis aos usuários. </text:p>
        </text:list-item>
      </text:list>
      <text:h text:style-name="P3" text:outline-level="2">14. Premissas do Projeto</text:h>
      <text:list text:style-name="L15">
        <text:list-item>
          <text:p text:style-name="P21"><text:bookmark text:name="p-rc_f3a4f93b99f6a652-454"/><text:span text:style-name="T1">Acesso à Internet:</text:span> O desenvolvimento do Projeto Turismo considera que os usuários possuirão acesso à internet para utilização das funcionalidades que dependem de serviços online. </text:p>
        </text:list-item>
        <text:list-item>
          <text:p text:style-name="P21"><text:bookmark text:name="p-rc_f3a4f93b99f6a652-455"/><text:span text:style-name="T1">Manutenção das Autoridades:</text:span> Assume-se que as informações turísticas cadastradas serão mantidas atualizadas pelos administradores e autoridades municipais responsáveis pelo conteúdo da plataforma. </text:p>
        </text:list-item>
        <text:list-item>
          <text:p text:style-name="P21"><text:bookmark text:name="p-rc_f3a4f93b99f6a652-456"/><text:span text:style-name="T1">Disponibilidade de APIs:</text:span> Considera-se que os serviços externos de mapas, geolocalização e tradução estarão disponíveis durante a utilização do sistema, permitindo o funcionamento adequado das funcionalidades que dependem dessas integrações. </text:p>
        </text:list-item>
        <text:list-item>
          <text:p text:style-name="P21"><text:bookmark text:name="p-rc_f3a4f93b99f6a652-457"/><text:span text:style-name="T1">Consentimento de Localização:</text:span> Também é assumido que os usuários fornecerão permissões de localização quando desejarem utilizar recursos baseados em geolocalização e geração automática de rotas. </text:p>
        </text:list-item>
        <text:list-item>
          <text:p text:style-name="P21"><text:bookmark text:name="p-rc_f3a4f93b99f6a652-458"/><text:span text:style-name="T1">Cronograma Acadêmico:</text:span> Por fim, considera-se que o projeto será desenvolvido dentro do cronograma acadêmico estabelecido pela disciplina e utilizando os recursos tecnológicos disponíveis para a equipe. </text:p>
        </text:list-item>
      </text:list>
      <text:h text:style-name="P3" text:outline-level="2">15. Restrições do Projeto</text:h>
      <text:list text:style-name="L16">
        <text:list-item>
          <text:p text:style-name="P22"><text:bookmark text:name="p-rc_f3a4f93b99f6a652-459"/><text:span text:style-name="T1">Tempo Acadêmico:</text:span> Por se tratar de um projeto acadêmico, o desenvolvimento estará limitado ao tempo disponível durante o semestre letivo e aos recursos técnicos acessíveis pela equipe. </text:p>
        </text:list-item>
        <text:list-item>
          <text:p text:style-name="P22"><text:bookmark text:name="p-rc_f3a4f93b99f6a652-460"/><text:span text:style-name="T1">Dependência de Terceiros:</text:span> A implementação de determinadas funcionalidades poderá depender da disponibilidade de APIs externas para mapas, localização e tradução automática. </text:p>
        </text:list-item>
        <text:list-item>
          <text:p text:style-name="P22"><text:bookmark text:name="p-rc_f3a4f93b99f6a652-461"/><text:soft-page-break/><text:span text:style-name="T1">Ausência de Operações Comerciais:</text:span> O sistema não realizará transações financeiras, reservas de hotéis, compra de passagens ou qualquer outra operação comercial envolvendo pagamentos. </text:p>
        </text:list-item>
        <text:list-item>
          <text:p text:style-name="P22"><text:bookmark text:name="p-rc_f3a4f93b99f6a652-462"/><text:span text:style-name="T1">Infraestrutura de Testes:</text:span> A infraestrutura utilizada para desenvolvimento e testes poderá possuir limitações de desempenho quando comparada a ambientes corporativos ou de produção. </text:p>
        </text:list-item>
        <text:list-item>
          <text:p text:style-name="P22"><text:bookmark text:name="p-rc_f3a4f93b99f6a652-463"/><text:span text:style-name="T1">Simplificação de Escopo:</text:span> Algumas funcionalidades avançadas previstas para versões futuras poderão ser implementadas de forma simplificada ou permanecer fora do escopo da versão inicial do sistema. </text:p>
        </text:list-item>
      </text:list>
      <text:h text:style-name="P3" text:outline-level="2">16. Análise de Riscos</text:h>
      <text:list text:style-name="L17">
        <text:list-item>
          <text:p text:style-name="P23"><text:bookmark text:name="p-rc_f3a4f93b99f6a652-464"/><text:span text:style-name="T1">Indisponibilidade de Serviços:</text:span> Um dos principais riscos do projeto está relacionado à dependência de serviços externos de mapas, geolocalização e tradução, que podem sofrer indisponibilidades ou alterações durante o desenvolvimento. </text:p>
        </text:list-item>
        <text:list-item>
          <text:p text:style-name="P23"><text:bookmark text:name="p-rc_f3a4f93b99f6a652-465"/><text:span text:style-name="T1">Mudança de Requisitos:</text:span> Existe também o risco de mudanças nos requisitos ao longo do projeto, o que pode impactar o cronograma e exigir adaptações na implementação. </text:p>
        </text:list-item>
        <text:list-item>
          <text:p text:style-name="P23"><text:bookmark text:name="p-rc_f3a4f93b99f6a652-466"/><text:span text:style-name="T1">Sobrecarga de Atividades:</text:span> Outro risco relevante é a limitação de tempo disponível para desenvolvimento, uma vez que o projeto será realizado paralelamente às demais atividades acadêmicas dos integrantes da equipe. </text:p>
        </text:list-item>
        <text:list-item>
          <text:p text:style-name="P23"><text:bookmark text:name="p-rc_f3a4f93b99f6a652-467"/><text:span text:style-name="T1">Defasagem de Informações:</text:span> Há ainda o risco de inconsistências ou falta de atualização nas informações turísticas cadastradas, o que pode comprometer a qualidade dos resultados apresentados aos usuários. </text:p>
        </text:list-item>
        <text:list-item>
          <text:p text:style-name="P23"><text:bookmark text:name="p-rc_f3a4f93b99f6a652-468"/><text:span text:style-name="T1">Desafios Técnicos de Integração:</text:span> Por fim, podem ocorrer desafios técnicos relacionados à integração entre os diferentes componentes do sistema, especialmente nas funcionalidades de roteirização, geolocalização e personalização de recomendações. </text:p>
        </text:list-item>
      </text:list>
      <text:h text:style-name="P3" text:outline-level="2">17. Integrações com Serviços Externos</text:h>
      <text:p text:style-name="P4"><text:bookmark text:name="p-rc_f3a4f93b99f6a652-469"/>O Projeto Turismo utilizará serviços externos para complementar suas funcionalidades e proporcionar uma experiência mais completa aos usuários. A utilização dessas integrações permitirá que a plataforma ofereça recursos avançados sem a necessidade de implementação própria de serviços geográficos ou de tradução automática, concentrando os esforços da equipe no desenvolvimento das funcionalidades principais do sistema. </text:p>
      <text:h text:style-name="P7" text:outline-level="3"><text:soft-page-break/>Tabela de Serviços e Finalidades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3"><text:span text:style-name="Strong_20_Emphasis"><text:span text:style-name="T2">Serviço ODT</text:span></text:span></text:p>
            </table:table-cell>
            <table:table-cell table:style-name="Tabela2.A1" office:value-type="string">
              <text:p text:style-name="P13"><text:span text:style-name="Strong_20_Emphasis"><text:span text:style-name="T2">Finalidade ODT</text:span></text:span></text:p>
            </table:table-cell>
          </table:table-row>
        </table:table-header-rows>
        <table:table-row>
          <table:table-cell table:style-name="Tabela2.A1" office:value-type="string">
            <text:p text:style-name="P14"><text:bookmark text:name="p-rc_f3a4f93b99f6a652-472"/><text:span text:style-name="T1">Google Maps Platform</text:span> </text:p>
          </table:table-cell>
          <table:table-cell table:style-name="Tabela2.A1" office:value-type="string">
            <text:p text:style-name="P14"><text:bookmark text:name="p-rc_f3a4f93b99f6a652-473"/>Geolocalização, exibição de mapas, cálculo de rotas e estimativa de deslocamento (ou visualização de mapas ). Permite localizar atrações turísticas e obter rotas otimizadas por meio de transporte. <text:span text:style-name="T3"/></text:p>
          </table:table-cell>
        </table:table-row>
        <table:table-row>
          <table:table-cell table:style-name="Tabela2.A1" office:value-type="string">
            <text:p text:style-name="P14"><text:bookmark text:name="p-rc_f3a4f93b99f6a652-474"/><text:span text:style-name="T1">API de Tradução</text:span> </text:p>
          </table:table-cell>
          <table:table-cell table:style-name="Tabela2.A1" office:value-type="string">
            <text:p text:style-name="P14"><text:bookmark text:name="p-rc_f3a4f93b99f6a652-475"/>Tradução automática de conteúdos e suporte a múltiplos idiomas. Contribui para a acessibilidade da plataforma para turistas internacionais. <text:span text:style-name="T3"/></text:p>
          </table:table-cell>
        </table:table-row>
      </table:table>
      <text:h text:style-name="P3" text:outline-level="2">18. Arquitetura do Sistema</text:h>
      <text:p text:style-name="P4"><text:bookmark text:name="p-rc_f3a4f93b99f6a652-476"/>O Projeto Turismo será desenvolvido utilizando uma <text:span text:style-name="T1">arquitetura em camadas</text:span>, promovendo a separação entre interface do usuário, lógica de negócio, persistência de dados e serviços externos. Essa abordagem facilita a manutenção, escalabilidade e evolução da aplicação. </text:p>
      <text:h text:style-name="P7" text:outline-level="3">Divisão das Camadas:</text:h>
      <text:list text:style-name="L18">
        <text:list-item>
          <text:p text:style-name="P24"><text:bookmark text:name="p-rc_f3a4f93b99f6a652-477"/><text:span text:style-name="T1">Camada de Apresentação (Frontend):</text:span> Responsável pela interface gráfica do sistema e pela interação com os usuários , permitindo a realização de pesquisas, visualização de locais turísticos, geração de roteiros personalizados e gerenciamento de informações pessoais. O acesso ocorrerá por meio de uma aplicação web responsiva. </text:p>
        </text:list-item>
        <text:list-item>
          <text:p text:style-name="P24"><text:bookmark text:name="p-rc_f3a4f93b99f6a652-478"/><text:span text:style-name="T1">Camada de Negócios (Backend):</text:span> Responsável pelo processamento das regras de negócio, gerenciamento dos dados e comunicação com serviços externos. Concentrará regras como pesquisa de locais, recomendações personalizadas, geração e otimização de roteiros, gerenciamento de avaliações, favoritos e controle de permissões. O backend será responsável por intermediar as requisições à Google Maps Platform. </text:p>
        </text:list-item>
        <text:list-item>
          <text:p text:style-name="P24"><text:bookmark text:name="p-rc_f3a4f93b99f6a652-479"/><text:span text:style-name="T1">Camada de Persistência (Banco de Dados):</text:span> Responsável pelo armazenamento persistente e recuperação das informações da plataforma , incluindo usuários, atrações turísticas, restaurantes, hotéis, avaliações e roteiros. Utilizará um banco de dados relacional. </text:p>
        </text:list-item>
        <text:list-item>
          <text:p text:style-name="P24"><text:bookmark text:name="p-rc_f3a4f93b99f6a652-480"/><text:soft-page-break/><text:span text:style-name="T1">Camada de Serviços Externos:</text:span> Responsável pelos serviços de geolocalização, mapas, cálculo de distâncias, rotas e navegação fornecidos pela Google Maps Platform. </text:p>
        </text:list-item>
      </text:list>
      <text:p text:style-name="P4"><text:bookmark text:name="p-rc_f3a4f93b99f6a652-481"/>A comunicação entre os componentes ocorrerá por meio de protocolos HTTP e HTTPS. </text:p>
      <text:h text:style-name="P3" text:outline-level="2">19. Critérios de Sucesso</text:h>
      <text:p text:style-name="P4"><text:bookmark text:name="p-rc_f3a4f93b99f6a652-482"/>O Projeto Turismo será considerado bem-sucedido caso seja capaz de atender aos requisitos funcionais e não funcionais definidos durante o levantamento de requisitos. </text:p>
      <text:h text:style-name="P7" text:outline-level="3">Indicadores de Sucesso:</text:h>
      <text:list text:style-name="L19">
        <text:list-item>
          <text:p text:style-name="P25"><text:bookmark text:name="p-rc_f3a4f93b99f6a652-483"/>Pesquisa de locais funcionando corretamente. </text:p>
        </text:list-item>
        <text:list-item>
          <text:p text:style-name="P25"><text:bookmark text:name="p-rc_f3a4f93b99f6a652-484"/>Exibição adequada de informações turísticas. </text:p>
        </text:list-item>
        <text:list-item>
          <text:p text:style-name="P25"><text:bookmark text:name="p-rc_f3a4f93b99f6a652-485"/>Geração de roteiros personalizados. </text:p>
        </text:list-item>
        <text:list-item>
          <text:p text:style-name="P25"><text:bookmark text:name="p-rc_f3a4f93b99f6a652-486"/>Integração funcional com a Google Maps Platform (exibição de mapas, localização de pontos e geração de rotas). </text:p>
        </text:list-item>
        <text:list-item>
          <text:p text:style-name="P25"><text:bookmark text:name="p-rc_f3a4f93b99f6a652-487"/>Sistema de avaliações e favoritos operando corretamente. </text:p>
        </text:list-item>
        <text:list-item>
          <text:p text:style-name="P25"><text:bookmark text:name="p-rc_f3a4f93b99f6a652-488"/>Interface intuitiva, de fácil utilização, responsiva e compatível com dispositivos modernos. </text:p>
        </text:list-item>
        <text:list-item>
          <text:p text:style-name="P25"><text:bookmark text:name="p-rc_f3a4f93b99f6a652-489"/>Capacidade de fornecer informações claras, organizadas e relevantes para diferentes perfis de viajantes (nacionais e internacionais). </text:p>
        </text:list-item>
        <text:list-item>
          <text:p text:style-name="P25"><text:bookmark text:name="p-rc_f3a4f93b99f6a652-490"/>Cumprimento integral dos requisitos funcionais e não funcionais definidos. </text:p>
        </text:list-item>
      </text:list>
      <text:h text:style-name="P3" text:outline-level="2">20. Planejamento de Entregas (Desenvolvimento Incremental)</text:h>
      <text:p text:style-name="P4"><text:bookmark text:name="p-rc_f3a4f93b99f6a652-491"/>O desenvolvimento do Projeto Turismo será realizado de forma incremental, permitindo a entrega gradual das funcionalidades previstas. </text:p>
      <text:h text:style-name="P7" text:outline-level="3">Fase 1: MVP (Funcionalidades Essenciais)</text:h>
      <text:p text:style-name="P4"><text:bookmark text:name="p-rc_f3a4f93b99f6a652-492"/>Focada na implementação das funcionalidades essenciais para validação da proposta: </text:p>
      <text:list text:style-name="L20">
        <text:list-item>
          <text:p text:style-name="P26"><text:bookmark text:name="p-rc_f3a4f93b99f6a652-493"/>Cadastro e autenticação de usuários. </text:p>
        </text:list-item>
        <text:list-item>
          <text:p text:style-name="P26"><text:bookmark text:name="p-rc_f3a4f93b99f6a652-494"/>Pesquisa de locais turísticos. </text:p>
        </text:list-item>
        <text:list-item>
          <text:p text:style-name="P26"><text:bookmark text:name="p-rc_f3a4f93b99f6a652-495"/><text:soft-page-break/>Visualização de informações detalhadas dos locais. </text:p>
        </text:list-item>
        <text:list-item>
          <text:p text:style-name="P26"><text:bookmark text:name="p-rc_f3a4f93b99f6a652-496"/>Sistema de favoritos. </text:p>
        </text:list-item>
        <text:list-item>
          <text:p text:style-name="P26"><text:bookmark text:name="p-rc_f3a4f93b99f6a652-497"/>Sistema de avaliações. </text:p>
        </text:list-item>
        <text:list-item>
          <text:p text:style-name="P26"><text:bookmark text:name="p-rc_f3a4f93b99f6a652-498"/>Integração básica com a Google Maps Platform (exibição de mapas e localização dos pontos turísticos). </text:p>
        </text:list-item>
      </text:list>
      <text:h text:style-name="P7" text:outline-level="3">Fase 2: Personalização e Experiência do Usuário</text:h>
      <text:p text:style-name="P4"><text:bookmark text:name="p-rc_f3a4f93b99f6a652-499"/>Desenvolvida após a conclusão do MVP: </text:p>
      <text:list text:style-name="L21">
        <text:list-item>
          <text:p text:style-name="P27"><text:bookmark text:name="p-rc_f3a4f93b99f6a652-500"/>Geração de roteiros personalizados. </text:p>
        </text:list-item>
        <text:list-item>
          <text:p text:style-name="P27"><text:bookmark text:name="p-rc_f3a4f93b99f6a652-501"/>Otimização de rotas. </text:p>
        </text:list-item>
        <text:list-item>
          <text:p text:style-name="P27"><text:bookmark text:name="p-rc_f3a4f93b99f6a652-502"/>Seleção de modal de transporte. </text:p>
        </text:list-item>
        <text:list-item>
          <text:p text:style-name="P27"><text:bookmark text:name="p-rc_f3a4f93b99f6a652-503"/>Recomendações baseadas no perfil do usuário. </text:p>
        </text:list-item>
        <text:list-item>
          <text:p text:style-name="P27"><text:bookmark text:name="p-rc_f3a4f93b99f6a652-504"/>Informações culturais e de segurança. </text:p>
        </text:list-item>
      </text:list>
      <text:h text:style-name="P7" text:outline-level="3">Fase 3: Funcionalidades Avançadas e Melhorias</text:h>
      <text:p text:style-name="P4"><text:bookmark text:name="p-rc_f3a4f93b99f6a652-505"/>Fase final de polimento da plataforma: </text:p>
      <text:list text:style-name="L22">
        <text:list-item>
          <text:p text:style-name="P28"><text:bookmark text:name="p-rc_f3a4f93b99f6a652-506"/>Suporte ampliado a múltiplos idiomas. </text:p>
        </text:list-item>
        <text:list-item>
          <text:p text:style-name="P28"><text:bookmark text:name="p-rc_f3a4f93b99f6a652-507"/>Tradução automática de conteúdos. </text:p>
        </text:list-item>
        <text:list-item>
          <text:p text:style-name="P28"><text:bookmark text:name="p-rc_f3a4f93b99f6a652-508"/>Destaque de locais com melhor custo-benefício. </text:p>
        </text:list-item>
        <text:list-item>
          <text:p text:style-name="P28"><text:bookmark text:name="p-rc_f3a4f93b99f6a652-509"/>Identificação de "Hidden Gems" (Locais pouco conhecidos, mas com boa qualidade). </text:p>
        </text:list-item>
        <text:list-item>
          <text:p text:style-name="P28"><text:bookmark text:name="p-rc_f3a4f93b99f6a652-510"/>Melhorias de desempenho e usabilidade. </text:p>
        </text:list-item>
        <text:list-item>
          <text:p text:style-name="P28"><text:bookmark text:name="p-rc_f3a4f93b99f6a652-511"/>Evolução dos algoritmos de recomendação. </text:p>
        </text:list-item>
      </text:list>
      <text:h text:style-name="P3" text:outline-level="2">21. Glossário de Termos Técnicos</text:h>
      <text:list text:style-name="L23">
        <text:list-item>
          <text:p text:style-name="P29"><text:bookmark text:name="p-rc_f3a4f93b99f6a652-512"/><text:span text:style-name="T1">API:</text:span> Conjunto de interfaces que permite a comunicação entre diferentes sistemas e serviços. </text:p>
        </text:list-item>
        <text:list-item>
          <text:p text:style-name="P29"><text:bookmark text:name="p-rc_f3a4f93b99f6a652-513"/><text:span text:style-name="T1">Backend:</text:span> Camada responsável pelo processamento das regras de negócio e gerenciamento dos dados da aplicação. </text:p>
        </text:list-item>
        <text:list-item>
          <text:p text:style-name="P29"><text:bookmark text:name="p-rc_f3a4f93b99f6a652-514"/><text:span text:style-name="T1">CityAuthority:</text:span> Usuário responsável pelo gerenciamento das informações turísticas de uma cidade específica. </text:p>
        </text:list-item>
        <text:list-item>
          <text:p text:style-name="P29"><text:bookmark text:name="p-rc_f3a4f93b99f6a652-515"/><text:soft-page-break/><text:span text:style-name="T1">Developer:</text:span> Usuário com permissões administrativas globais sobre a plataforma. </text:p>
        </text:list-item>
        <text:list-item>
          <text:p text:style-name="P29"><text:bookmark text:name="p-rc_f3a4f93b99f6a652-516"/><text:span text:style-name="T1">Frontend:</text:span> Camada responsável pela interface gráfica e interação com o usuário. </text:p>
        </text:list-item>
        <text:list-item>
          <text:p text:style-name="P29"><text:bookmark text:name="p-rc_f3a4f93b99f6a652-517"/><text:span text:style-name="T1">Google Maps Platform:</text:span> Plataforma de serviços geográficos utilizada para mapas, geolocalização, cálculo de distâncias e geração de rotas. </text:p>
        </text:list-item>
        <text:list-item>
          <text:p text:style-name="P29"><text:bookmark text:name="p-rc_f3a4f93b99f6a652-518"/><text:span text:style-name="T1">Hidden Gems:</text:span> Locais pouco conhecidos pelo público geral, mas que apresentam boa qualidade e relevância turística. </text:p>
        </text:list-item>
        <text:list-item>
          <text:p text:style-name="P29"><text:bookmark text:name="p-rc_f3a4f93b99f6a652-519"/><text:span text:style-name="T1">Roteiro:</text:span> Conjunto organizado de locais e atividades planejados para uma viagem. </text:p>
        </text:list-item>
        <text:list-item>
          <text:p text:style-name="P29"><text:bookmark text:name="p-rc_f3a4f93b99f6a652-520"/><text:span text:style-name="T1">Ponto de Interesse (Local):</text:span> Qualquer atração, restaurante, hotel ou ponto de interesse cadastrado na plataforma. </text:p>
        </text:list-item>
        <text:list-item>
          <text:p text:style-name="P29"><text:bookmark text:name="p-rc_f3a4f93b99f6a652-521"/><text:span text:style-name="T1">Viajante (Traveler):</text:span> Usuário final da plataforma que utiliza os recursos de pesquisa, recomendação e planejamento de viagens. </text:p>
        </text:list-item>
        <text:list-item>
          <text:p text:style-name="P29"><text:bookmark text:name="p-rc_f3a4f93b99f6a652-522"/><text:span text:style-name="T1">UML:</text:span> Linguagem de modelagem utilizada para representar a estrutura e o comportamento do sistema. </text:p>
        </text:list-item>
      </text:list>
      <text:p text:style-name="P30"/>
      <text:p text:style-name="P31"><draw:frame draw:style-name="fr1" draw:name="Figura1" text:anchor-type="char" svg:width="17cm" svg:height="7.999cm" draw:z-index="0"><draw:image xlink:href="Pictures/1000000000000640000002F1A03F2A6A.jpg" xlink:type="simple" xlink:show="embed" xlink:actuate="onLoad" draw:mime-type="image/jpeg"/></draw:frame>Diagrama de classe</text:p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Diagrama de casos de uso</text:p>
      <text:p text:style-name="P31"/>
      <text:p text:style-name="P31"/>
      <text:p text:style-name="P31"><draw:frame draw:style-name="fr2" draw:name="Figura2" text:anchor-type="char" svg:x="0.383cm" svg:y="-0.143cm" svg:width="12.532cm" svg:height="25.425cm" draw:z-index="1"><draw:image xlink:href="Pictures/1000A08D00005B5D000139FCF832DC87.svg" xlink:type="simple" xlink:show="embed" xlink:actuate="onLoad" draw:mime-type="image/svg+xml"/><draw:image xlink:href="Pictures/100000010000017D0000051FC8D3F1B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4T16:01:20.107807699</meta:creation-date>
    <meta:editing-duration>PT49M40S</meta:editing-duration>
    <meta:editing-cycles>5</meta:editing-cycles>
    <meta:generator>LibreOffice/26.2.2.2$Linux_X86_64 LibreOffice_project/620$Build-2</meta:generator>
    <dc:date>2026-06-14T22:58:29.842257435</dc:date>
    <meta:document-statistic meta:table-count="2" meta:image-count="2" meta:object-count="0" meta:page-count="17" meta:paragraph-count="238" meta:word-count="3760" meta:character-count="27309" meta:non-whitespace-character-count="23738"/>
  </office:meta>
</office:document-meta>
</file>